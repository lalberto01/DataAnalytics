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olve this math problem</text:p>
      <text:p text:style-name="Normal">(3*3+1)/(2*2*2+1)=</text:p>
      <text:p text:style-name="Normal">10/9=</text:p>
      <text:p text:style-name="Normal">1.111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esley alberto</meta:initial-creator>
    <dc:creator>lesley alberto</dc:creator>
    <meta:creation-date>2026-03-25T17:22:00Z</meta:creation-date>
    <dc:date>2026-03-25T17:25:00Z</dc:date>
    <meta:template xlink:href="Normal" xlink:type="simple"/>
    <meta:editing-cycles>1</meta:editing-cycles>
    <meta:editing-duration>PT180S</meta:editing-duration>
    <meta:document-statistic meta:page-count="1" meta:paragraph-count="1" meta:word-count="8" meta:character-count="54" meta:row-count="1" meta:non-whitespace-character-count="47"/>
  </office:meta>
</office:document-meta>
</file>